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text-properties fo:color="#000000"/>
    </style:style>
    <style:style style:name="TableColumn8" style:family="table-column">
      <style:table-column-properties style:column-width="6.693in" style:use-optimal-column-width="false"/>
    </style:style>
    <style:style style:name="Table7" style:family="table">
      <style:table-properties style:width="6.6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Simple guide on how to help simple.<text:line-break/>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tandard">INSERT INTO `world_bfa`.`creature_template_scaling` (`Entry`, `LevelScalingMin`, `LevelScalingMax`, `VerifiedBuild`) VALUES</text:p>
            <text:p text:style-name="Standard">(11112222211, 15, 60, 0),</text:p>
            <text:p text:style-name="Standard">(11111222222, 15, 60, 0);</text:p>
            <text:p text:style-name="Standard"/>
            <text:p text:style-name="Standard"/>
            <text:p text:style-name="Standard">..... many other creatures</text:p>
            <text:p text:style-name="Standard"/>
            <text:p text:style-name="Standard">(111111, 15, 60, 0),</text:p>
            <text:p text:style-name="P6">(119999, 16, 60, 0);</text:p>
          </table:table-cell>
        </table:table-row>
      </table:table>
      <text:p text:style-name="Standard"/>
      <text:p text:style-name="Standard"/>
      <text:p text:style-name="Standard">111111... 119999 are the creature IDs, .npc info gets<text:s/>you that.</text:p>
      <text:p text:style-name="Standard">15 is the the starting level, you get that by looking at the NPC</text:p>
      <text:p text:style-name="Standard">60 is the end of scaling, you can simply check the zone.</text:p>
      <text:p text:style-name="Standard">0 is the checked build where it is working, just leave it 0</text:p>
      <text:p text:style-name="Standard"/>
      <text:p text:style-name="Standard">now you can run through the world, check each not scaled npc and make a long list in the format above</text:p>
      <text:p text:style-name="Standard"/>
      <text:p text:style-name="Standard">It would look like the follwing in the end.</text:p>
      <text:p text:style-name="Standard"/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Standard">INSERT INTO `world_bfa`.`creature_template_scaling` (`Entry`, `LevelScalingMin`, `LevelScalingMax`, `VerifiedBuild`) VALUES</text:p>
            <text:p text:style-name="Standard">(111111, 15, 60, 0),</text:p>
            <text:p text:style-name="Standard">(111112, 15, 60, 0),</text:p>
            <text:p text:style-name="Standard">(111113, 15, 60, 0),</text:p>
            <text:p text:style-name="Standard">(111114, 15, 60, 0),</text:p>
            <text:p text:style-name="Standard">(111115, 15, 60, 0),</text:p>
            <text:p text:style-name="Standard">(111116, 15, 60, 0),</text:p>
            <text:p text:style-name="Standard">(111117, 15, 60, 0),</text:p>
            <text:p text:style-name="Standard">(111118, 15, 60, 0),</text:p>
            <text:p text:style-name="Standard">(111119, 15, 60, 0),</text:p>
            <text:p text:style-name="Standard">(1112113, 15, 60, 0),</text:p>
            <text:p text:style-name="Standard">(1115114, 15, 60, 0),</text:p>
            <text:p text:style-name="Standard">(1116115, 15, 60, 0),</text:p>
            <text:p text:style-name="Standard">(1117116, 15, 60, 0),</text:p>
            <text:p text:style-name="Standard">(1118117, 15, 60, 0),</text:p>
            <text:p text:style-name="Standard">(11999925, 16, 60, 0);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enislav Shalamanov</dc:creator>
    <meta:creation-date>2024-04-13T15:15:00Z</meta:creation-date>
    <dc:date>2026-07-06T19:30:00Z</dc:date>
    <meta:template xlink:href="Normal.dotm" xlink:type="simple"/>
    <meta:editing-cycles>2</meta:editing-cycles>
    <meta:editing-duration>PT180S</meta:editing-duration>
    <meta:document-statistic meta:page-count="1" meta:paragraph-count="2" meta:word-count="168" meta:character-count="1130" meta:row-count="8" meta:non-whitespace-character-count="964"/>
  </office:meta>
</office:document-meta>
</file>